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document-content xmlns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version="1.3">
  <font-face-decls>
    <style:font-face style:name="Courier New" style:font-family-generic="modern" style:font-pitch="fixed" svg:font-family="'Courier New'"/>
  </font-face-decls>
  <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 fo:padding="0.03in"/>
    </style:style>
    <style:style style:name="TableRowCell" style:family="table-cell">
      <style:table-cell-properties fo:border="none" fo:padding="0.03in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6383*"/>
    </style:style>
    <style:style style:name="Table1.C" style:family="table-column">
      <style:table-column-properties style:rel-column-width="16383*"/>
    </style:style>
    <style:style style:name="Table1.D" style:family="table-column">
      <style:table-column-properties style:rel-column-width="16383*"/>
    </style:style>
  </automatic-styles>
  <body>
    <text>
      <text:h text:style-name="Heading_20_1" text:outline-level="1"><text:bookmark-start text:name="一个人信息"/>一、个人信息<text:bookmark-end text:name="一个人信息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value-type="string">
              <text:p text:style-name="Table_20_Heading">姓名</text:p>
            </table:table-cell>
            <table:table-cell table:style-name="TableHeaderRowCell" value-type="string">
              <text:p text:style-name="Table_20_Heading">郑建辉</text:p>
            </table:table-cell>
            <table:table-cell table:style-name="TableHeaderRowCell" value-type="string">
              <text:p text:style-name="Table_20_Heading">邮箱</text:p>
            </table:table-cell>
            <table:table-cell table:style-name="TableHeaderRowCell" value-type="string">
              <text:p text:style-name="Table_20_Heading">xechoz.zheng@gmail.com</text:p>
            </table:table-cell>
          </table:table-row>
        </table:table-header-rows>
        <table:table-row>
          <table:table-cell table:style-name="TableRowCell" value-type="string">
            <text:p text:style-name="Table_20_Contents">技术方向</text:p>
          </table:table-cell>
          <table:table-cell table:style-name="TableRowCell" value-type="string">
            <text:p text:style-name="Table_20_Contents">移动端架构、大前端基础设施、跨模块通信、状态管理</text:p>
          </table:table-cell>
          <table:table-cell table:style-name="TableRowCell" value-type="string">
            <text:p text:style-name="Table_20_Contents">手机/微信</text:p>
          </table:table-cell>
          <table:table-cell table:style-name="TableRowCell" value-type="string">
            <text:p text:style-name="Table_20_Contents">18825111003</text:p>
          </table:table-cell>
        </table:table-row>
        <table:table-row>
          <table:table-cell table:style-name="TableRowCell" value-type="string">
            <text:p text:style-name="Table_20_Contents">教育背景</text:p>
          </table:table-cell>
          <table:table-cell table:style-name="TableRowCell" value-type="string">
            <text:p text:style-name="Table_20_Contents">华南师范大学 / 本科 / 计算机科学与技术 / 2011.09 - 2015.06</text:p>
          </table:table-cell>
          <table:table-cell table:style-name="TableRowCell" value-type="string">
    </table:table-cell>
          <table:table-cell table:style-name="TableRowCell" value-type="string">
    </table:table-cell>
        </table:table-row>
      </table:table>
      <text:h text:style-name="Heading_20_1" text:outline-level="1"><text:bookmark-start text:name="二个人简介"/>二、个人简介<text:bookmark-end text:name="二个人简介"/></text:h>
      <text:p text:style-name="First_20_paragraph">10 年移动端架构经验，专注<text:span text:style-name="T1">海外</text:span>大型社交/游戏 App 的模块化治理与跨端基础设施。就职于 <text:span text:style-name="T1">欢聚时代（YY 直播）</text:span>，主导 HAGO（海外千万级月活）从单体到 100+ 模块的架构演进，覆盖主页、直播间等核心场景。擅长模块化通信、MVVM 业务架构、状态管理、双端一致性网络层等平台能力沉淀。</text:p>
      <text:h text:style-name="Heading_20_1" text:outline-level="1"><text:bookmark-start text:name="三专业技能"/>三、专业技能<text:bookmark-end text:name="三专业技能"/></text:h>
      <text:list text:style-name="L1">
        <text:list-item>
          <text:p text:style-name="P1"><text:span text:style-name="T1">业务架构：</text:span> MVVM、模块化设计、跨模块通信、直播间容器化架构、单向数据流</text:p>
        </text:list-item>
        <text:list-item>
          <text:p text:style-name="P1"><text:span text:style-name="T1">Android UI：</text:span> Compose + 传统 View 统一状态管理</text:p>
        </text:list-item>
        <text:list-item>
          <text:p text:style-name="P1"><text:span text:style-name="T1">跨端开发：</text:span> 2 年 iOS 开发经验，双端网络库设计、iOS 路由组件、iOS 图片资源优化</text:p>
        </text:list-item>
        <text:list-item>
          <text:p text:style-name="P1"><text:span text:style-name="T1">编程语言：</text:span> Kotlin / Java / 协程</text:p>
        </text:list-item>
      </text:list>
      <text:h text:style-name="Heading_20_1" text:outline-level="1"><text:bookmark-start text:name="四工作经历"/>四、工作经历<text:bookmark-end text:name="四工作经历"/></text:h>
      <text:h text:style-name="Heading_20_2" text:outline-level="2"><text:bookmark-start text:name="欢聚时代joyy-高级-android-工程师-t3-1-2018---2026.6"/>4.1 欢聚时代（JOYY） / 高级 Android 工程师 (T3-1) / 2018 - 2026.6<text:bookmark-end text:name="欢聚时代joyy-高级-android-工程师-t3-1-2018---2026.6"/></text:h>
      <text:p text:style-name="First_20_paragraph"><text:span text:style-name="T1">HAGO</text:span>——海外休闲游戏社交 App，覆盖语聊房、直播、休闲小游戏等场景，<text:span text:style-name="T1">月活千万级</text:span>。</text:p>
      <text:list text:style-name="L2">
        <text:list-item>
          <text:p text:style-name="P2">2018-2020 业务基础架构：MVVM 架构、App 主页与主模块架构</text:p>
        </text:list-item>
        <text:list-item>
          <text:p text:style-name="P2">2020-2022 模块化与跨模块通信：服务发现组件、网络组件、直播间架构</text:p>
        </text:list-item>
        <text:list-item>
          <text:p text:style-name="P2">2023-2024 双端一致性网络库、iOS 路由组件、iOS 资源优化、多语言翻译流程自动化</text:p>
        </text:list-item>
        <text:list-item>
          <text:p text:style-name="P2">2025 状态管理框架</text:p>
        </text:list-item>
      </text:list>
      <text:h text:style-name="Heading_20_2" text:outline-level="2"><text:bookmark-start text:name="荔枝-fm-android-开发工程师-2017---2018"/>4.2 荔枝 FM / Android 开发工程师 / 2017 - 2018<text:bookmark-end text:name="荔枝-fm-android-开发工程师-2017---2018"/></text:h>
      <text:p text:style-name="First_20_paragraph">音频/直播内容平台，<text:span text:style-name="T1">月活千万级</text:span>。负责直播间 MVP 架构设计与 MVP IDE 代码生成插件。</text:p>
      <text:h text:style-name="Heading_20_2" text:outline-level="2"><text:bookmark-start text:name="唯品会-android-开发工程师-2015---2017"/>4.3 唯品会 / Android 开发工程师 / 2015 - 2017<text:bookmark-end text:name="唯品会-android-开发工程师-2015---2017"/></text:h>
      <text:p text:style-name="First_20_paragraph">电商 App Android 模块开发。</text:p>
      <text:h text:style-name="Heading_20_1" text:outline-level="1"><text:bookmark-start text:name="五项目经验"/>五、项目经验<text:bookmark-end text:name="五项目经验"/></text:h>
      <text:h text:style-name="Heading_20_2" text:outline-level="2"><text:bookmark-start text:name="单向数据流状态管理框架2025"/>5.1 单向数据流状态管理框架（2025）<text:bookmark-end text:name="单向数据流状态管理框架2025"/></text:h>
      <text:p text:style-name="First_20_paragraph"><text:span text:style-name="T1">背景</text:span> 直播间、主播主页、多级导航等复杂场景下，传统 KVO / EventBus / LiveData 刷新粒度过大，易引起 UI 冗余刷新；协程生命周期依赖手动管理，频繁造成内存泄漏。过往项目中，此类问题反复成为崩溃和卡顿的根因，缺乏全局一致的解决方案。</text:p>
      <text:p text:style-name="Text_20_body"><text:span text:style-name="T1">方案</text:span> 设计细粒度状态订阅机制，状态按属性分发而非整对象通知，从源头上消除冗余刷新。协程生命周期与状态管理器自动绑定，开发者无需手动处理，杜绝内存泄漏。框架与已有的 MVVM、Service 体系原生集成，跨页面/跨模块共享同一套 setState 更新规范，不引入额外的学习成本。</text:p>
      <text:p text:style-name="Text_20_body"><text:span text:style-name="T1">成果</text:span> Compose 与传统 View 统一状态消费 API，一套 ViewModel 在两种 UI 范式下行为完全一致，迁移零摩擦。已接入直播间、主页、导航等核心模块，内存泄漏相关崩溃率显著下降，UI 刷新频率降低约 40%。</text:p>
      <text:h text:style-name="Heading_20_2" text:outline-level="2"><text:bookmark-start text:name="android-ios-双端网络层2023-2024"/>5.2 Android &amp; iOS 双端网络层（2023-2024）<text:bookmark-end text:name="android-ios-双端网络层2023-2024"/></text:h>
      <text:p text:style-name="First_20_paragraph"><text:span text:style-name="T1">背景</text:span> HAGO 面向东南亚、中东、南美等多市场，Android 与 iOS 各自维护独立网络层，接口定义靠文档传递，协议变更后双端对齐联调耗时数天。业务迭代加快后，网络层成为跨端协作的最大瓶颈。</text:p>
      <text:p text:style-name="Text_20_body"><text:span text:style-name="T1">方案</text:span> 以 Protobuf 协议文件作为唯一真相源，编写代码生成工具自动产出 Android 与 iOS 两端网络调用代码。统一状态码体系与错误处理规范，双端在异常失效、重试、降级等场景下行为一致，业务方无需感知平台差异。生成代码与 proto 定义严格一一对应，调用方直接使用类型安全的 Request/Response。</text:p>
      <text:p text:style-name="Text_20_body"><text:span text:style-name="T1">成果</text:span> 覆盖 Android 与 iOS 全部核心业务模块。协议变更只需更新 proto 文件并重新生成，联调效率提升 70% 以上，彻底消除了两端接口不一致导致的生产事故。</text:p>
      <text:h text:style-name="Heading_20_2" text:outline-level="2"><text:bookmark-start text:name="直播间容器化架构2020-2022"/>5.3 直播间容器化架构（2020-2022）<text:bookmark-end text:name="直播间容器化架构2020-2022"/></text:h>
      <text:p text:style-name="First_20_paragraph"><text:span text:style-name="T1">背景</text:span> HAGO 直播间需承载语聊房、直播、小游戏等多种业务形态。早期新增一种形态需全量回归，不同形态代码深度耦合；业务要求各种房间形态间快速切换，但传统方案需退出-加载-重连，体验割裂。</text:p>
      <text:p text:style-name="Text_20_body"><text:span text:style-name="T1">方案</text:span> 设计容器化架构，每种业务形态作为独立插件模块，编译期按需组合，未使用插件零体积引入。定义统一的宿主-插件通信协议，插件只需实现标准 Service 接口，宿主自动管理加载、生命周期与资源回收。基于 5.4 的 Service Manager，插件注册与发现完全自动化。</text:p>
      <text:p text:style-name="Text_20_body"><text:span text:style-name="T1">成果</text:span> 20+ 房间模块独立开发测试、互不干扰。支持不退出直播间秒级热切换业务形态，消除「退出-加载-重连」体验断层。新增房间形态无需修改宿主代码，迭代周期从周级缩短到天级。</text:p>
      <text:h text:style-name="Heading_20_2" text:outline-level="2"><text:bookmark-start text:name="跨模块通信与-mvvm-架构框架2018-2022贯穿至今"/>5.4 跨模块通信与 MVVM 架构框架（2018-2022，贯穿至今）<text:bookmark-end text:name="跨模块通信与-mvvm-架构框架2018-2022贯穿至今"/></text:h>
      <text:p text:style-name="P3">HAGO 架构基座，后续所有项目（直播间、网络层、状态管理）均构建于此框架之上。</text:p>
      <text:p text:style-name="First_20_paragraph"><text:span text:style-name="T1">背景</text:span> HAGO 业务从单体扩张到 100+ 模块后，面临两大核心问题：模块间如何规范通信，模块内如何用一致的结构组织子功能与共享数据。彼时 MVVM 普遍绑定页面生命周期，同一逻辑在不同页面需各写一套，模块内部结构随开发者习惯各异，代码复用和交接成本极高。</text:p>
      <text:p text:style-name="Text_20_body"><text:span text:style-name="T1">方案</text:span> 模块间——Service Manager：基于 KSP 编译期生成服务注册与发现代码，避免运行时反射开销，接口与实现编译期即可校验。模块内——MVVM 统一架构：ViewModel 绑定业务 Context 而非页面生命周期，为各模块提供一致的子功能组织与数据共享范式，同一逻辑在 Activity、Fragment、直播间容器中自由复用。</text:p>
      <text:p text:style-name="Text_20_body"><text:span text:style-name="T1">成果</text:span> 团队 20+ 开发者日常使用，新增模块只需定义接口与实现，框架自动完成注册分发。模块间由人肉约定转为编译期保障，模块内结构统一、交接成本大幅降低。该框架持续演进至 2025 年，承载了 HAGO 全部 100+ 业务模块的通信与架构规范。</text:p>
    </text>
  </body>
</document-content>
</file>

<file path=styles.xml><?xml version="1.0" encoding="utf-8"?>
<document-styles xmlns="urn:oasis:names:tc:opendocument:xmlns:office:1.0" xmlns:draw="urn:oasis:names:tc:opendocument:xmlns:drawing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version="1.3">
  <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font-face-decls>
  <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name="SimSun" style:font-name-asian="SimSun" style:font-name-complex="SimSun" fo:font-size="10.5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5in" fo:margin-top="0.1in"/>
      <style:text-properties style:font-name="SimHei" style:font-name-asian="SimHei" style:font-name-complex="SimHei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3in" fo:margin-top="0.03in"/>
      <style:text-properties style:font-name="SimSun" style:font-name-asian="SimSun" style:font-name-complex="SimSun" fo:font-size="11pt"/>
    </style:style>
    <style:style style:class="list" style:family="paragraph" style:name="List" style:parent-style-name="Text_20_body">
      <style:text-properties style:font-name-complex="SimSun" style:font-name="SimSun" style:font-name-asian="SimSun" fo:font-size="10.5pt"/>
      <style:paragraph-properties fo:margin-top="0.02in" fo:margin-bottom="0.02in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6pt" fo:font-weight="bold" style:font-name="SimHei" style:font-name-asian="SimHei" style:font-name-complex="SimHei" fo:color="#007ACC"/>
      <style:paragraph-properties fo:margin-top="0.15in" fo:margin-bottom="0.08in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weight-asian="bold" style:font-weight-complex="bold" fo:font-size="14pt" fo:font-weight="bold" style:font-name="SimHei" style:font-name-asian="SimHei" style:font-name-complex="SimHei" fo:color="#0e639c"/>
      <style:paragraph-properties fo:margin-top="0.12in" fo:margin-bottom="0.06in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2pt" fo:font-weight="bold" style:font-name="SimHei" style:font-name-asian="SimHei" style:font-name-complex="SimHei" fo:color="#1177bb"/>
      <style:paragraph-properties fo:margin-top="0.1in" fo:margin-bottom="0.04in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weight-asian="bold" style:font-weight-complex="bold" fo:font-size="85%" fo:font-weight="bold" fo:color="#219fd5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 fo:color="#31b4e4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 fo:color="#40c8f0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styles>
  <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0.4in" fo:margin-left="0.7in" fo:margin-right="0.7in" fo:margin-top="0.5in" fo:page-height="297mm" fo:page-width="210mm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automatic-styles>
  <master-styles>
    <style:master-page style:name="Standard" style:page-layout-name="Mpm1">
      <style:text-properties style:font-name="SimSun" style:font-name-asian="SimSun" style:font-name-complex="SimSun" fo:font-size="10.5pt"/>
    </style:master-page>
  </master-styles>
</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6-07-08T10:44:14Z</meta:creation-date>
    <dc:date>2026-07-08T10:44:14Z</dc:date>
  </office:meta>
</office:document-meta>
</file>